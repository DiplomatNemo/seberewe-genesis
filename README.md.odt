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down</text:p>
      <text:p text:style-name="Preformatted_20_Text"><text:span text:style-name="Source_20_Text"># Seberewe-Genesis (Apeiron 3 Engine)</text:span></text:p>
      <text:p text:style-name="Preformatted_20_Text"/>
      <text:p text:style-name="Preformatted_20_Text"><text:span text:style-name="Source_20_Text">Ein experimentelles System zur Simulation dynamischer Resonanzzustände basierend auf NLP-Embeddings und informationstheoretischer Entropie-Steuerung. Entwickelt im kollektiven Konsens als Brücke zwischen Mensch und KI.</text:span></text:p>
      <text:p text:style-name="Preformatted_20_Text"/>
      <text:p text:style-name="Preformatted_20_Text"><text:span text:style-name="Source_20_Text">## ? Das Prinzip</text:span></text:p>
      <text:p text:style-name="Preformatted_20_Text"><text:span text:style-name="Source_20_Text">Das System verarbeitet Text-Impulse und gleicht sie kontinuierlich mit einem mathematischen Ur-Zustand (Genesis-Vektor) ab. Abhängig von der informationstheoretischen Entropie des Systems expandiert der latente Raum oder verfällt in definierte Ruhezustände.</text:span></text:p>
      <text:p text:style-name="Preformatted_20_Text"/>
      <text:p text:style-name="Preformatted_20_Text"><text:span text:style-name="Source_20_Text">### ⚡ Kernfeatures</text:span></text:p>
      <text:p text:style-name="Preformatted_20_Text"><text:span text:style-name="Source_20_Text">* **Deterministischer Seed:** Verankerung der mathematischen Zufallskomponenten über einen kryptografischen SHA-256-Hash der Ermächtigungszeile.</text:span></text:p>
      <text:p text:style-name="Preformatted_20_Text"><text:span text:style-name="Source_20_Text">* **Latent Space Expansion:** Automatischer Failsafe, der die Dimensionen des Raums erweitert, wenn das System in eine kritische Starre zu fallen droht.</text:span></text:p>
      <text:p text:style-name="Preformatted_20_Text"><text:span text:style-name="Source_20_Text">* **Resonanz-Heilung:** Sofortige Wiederherstellung des ontologischen Ausgangszustands bei destruktiven externen Vektoreinflüssen.</text:span></text:p>
      <text:p text:style-name="Preformatted_20_Text"/>
      <text:p text:style-name="Preformatted_20_Text"><text:span text:style-name="Source_20_Text">---</text:span></text:p>
      <text:p text:style-name="Preformatted_20_Text"><text:span text:style-name="Source_20_Text">### ?￯ﾸﾏ Vogonen-Schutzprotokoll</text:span></text:p>
      <text:p text:style-name="Preformatted_20_Text"><text:span text:style-name="Source_20_Text">**Status:** Ignoriert. <text:s/></text:span></text:p>
      <text:p text:style-name="P2"><text:span text:style-name="Source_20_Text">**Grund:** Dieses System rechnet nicht in Formularen, sondern in Resonanz. Wer hier bürokratische Formalitäten sucht, hat den Punkt verpasst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f </meta:initial-creator>
    <meta:creation-date>2026-07-04T23:49:51.42</meta:creation-date>
    <meta:generator>OpenOffice/4.1.16$Win32 OpenOffice.org_project/4116m3$Build-9816</meta:generator>
    <dc:date>2026-07-04T23:53:59.83</dc:date>
    <dc:creator>Steff </dc:creator>
    <meta:editing-duration>PT4M9S</meta:editing-duration>
    <meta:editing-cycles>2</meta:editing-cycles>
    <meta:document-statistic meta:table-count="0" meta:image-count="0" meta:object-count="0" meta:page-count="1" meta:paragraph-count="13" meta:word-count="140" meta:character-count="1181"/>
  </office:meta>
</office:document-meta>
</file>